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4000000DDEE879B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AI Distill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Gabriel Pa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at is Distillation?</text:p>
          </draw:text-box>
        </draw:frame>
        <draw:frame draw:style-name="gr2" draw:text-style-name="P2" draw:layer="layout" svg:width="9.032cm" svg:height="8.753cm" svg:x="2cm" svg:y="3.5cm">
          <draw:image xlink:href="Pictures/10000001000000E4000000DDEE879B58.png" xlink:type="simple" xlink:show="embed" xlink:actuate="onLoad" draw:mime-type="image/png">
            <text:p/>
          </draw:image>
        </draw:frame>
        <draw:frame draw:style-name="gr3" draw:text-style-name="P3" draw:layer="layout" svg:width="13.5cm" svg:height="7.5cm" svg:x="12.5cm" svg:y="4.5cm">
          <draw:text-box>
            <text:p>* simpler model is trained to replicate teacher behavio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dge/Mobile deployments</text:p>
              </text:list-item>
              <text:list-item>
                <text:p>Large Language Models (LLM) Optimizations</text:p>
              </text:list-item>
              <text:list-item>
                <text:p>Inference cost redu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rade-Offs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Smaller and faster models</text:p>
                  </text:list-item>
                  <text:list-item>
                    <text:p>Often as robust as the teacher</text:p>
                  </text:list-item>
                </text:list>
              </text:list-item>
            </text:list>
          </draw:text-box>
        </draw:frame>
        <draw:frame presentation:style-name="pr4" draw:layer="layout" svg:width="12.6cm" svg:height="9.134cm" svg:x="14.5cm" svg:y="3.7cm" presentation:class="outline" presentation:user-transformed="true">
          <draw:text-box>
            <text:list text:style-name="L2">
              <text:list-item>
                <text:p>Cons</text:p>
                <text:list>
                  <text:list-item>
                    <text:p>Some accuracy lose is common</text:p>
                  </text:list-item>
                  <text:list-item>
                    <text:p>Requires a proper teacher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9:01:21.449497150</meta:creation-date>
    <dc:date>2026-03-30T08:28:56.284834740</dc:date>
    <meta:editing-duration>PT20M50S</meta:editing-duration>
    <meta:editing-cycles>8</meta:editing-cycles>
    <meta:generator>LibreOffice/24.2.7.2$Linux_X86_64 LibreOffice_project/420$Build-2</meta:generator>
    <meta:document-statistic meta:object-count="39"/>
  </office:meta>
</office:document-meta>
</file>